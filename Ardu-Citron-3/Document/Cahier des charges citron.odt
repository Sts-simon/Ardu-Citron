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3c390" officeooo:paragraph-rsid="0003c39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c390" officeooo:paragraph-rsid="0003c390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3c390" officeooo:paragraph-rsid="0003c39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5b613" officeooo:paragraph-rsid="0005b61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05b613" officeooo:paragraph-rsid="0005b613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09950d" officeooo:paragraph-rsid="0008fb2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size="20pt" style:text-underline-style="solid" style:text-underline-width="auto" style:text-underline-color="font-color" fo:font-weight="bold" officeooo:rsid="000a6eae" officeooo:paragraph-rsid="000a6eae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size="20pt" style:text-underline-style="solid" style:text-underline-width="auto" style:text-underline-color="font-color" fo:font-weight="bold" officeooo:rsid="00070b66" officeooo:paragraph-rsid="00070b66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070b66" officeooo:paragraph-rsid="00070b6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070b66" officeooo:paragraph-rsid="00070b6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margin-left="1.251cm" fo:text-align="justify" style:justify-single-word="false" fo:text-indent="0cm" style:auto-text-indent="false"/>
      <style:text-properties fo:color="#000000" loext:opacity="100%" fo:font-size="16pt" style:text-underline-style="none" fo:font-weight="normal" officeooo:rsid="00070b66" officeooo:paragraph-rsid="00070b66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margin-left="2.501cm" fo:text-align="justify" style:justify-single-word="false" fo:text-indent="0cm" style:auto-text-indent="false"/>
      <style:text-properties fo:color="#000000" loext:opacity="100%" fo:font-size="16pt" style:text-underline-style="none" fo:font-weight="normal" officeooo:rsid="00070b66" officeooo:paragraph-rsid="00070b66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margin-left="2.501cm" fo:text-align="justify" style:justify-single-word="false" fo:text-indent="0cm" style:auto-text-indent="false"/>
      <style:text-properties fo:color="#000000" loext:opacity="100%" fo:font-size="16pt" style:text-underline-style="none" fo:font-weight="normal" officeooo:rsid="000bcea6" officeooo:paragraph-rsid="000bcea6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margin-left="2.501cm" fo:text-align="justify" style:justify-single-word="false" fo:text-indent="0cm" style:auto-text-indent="false"/>
      <style:text-properties fo:color="#000000" loext:opacity="100%" fo:font-size="16pt" style:text-underline-style="none" fo:font-weight="normal" officeooo:rsid="000d0cf0" officeooo:paragraph-rsid="000d0cf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margin-left="1.251cm" fo:text-align="justify" style:justify-single-word="false" fo:text-indent="0cm" style:auto-text-indent="false"/>
      <style:text-properties fo:color="#000000" loext:opacity="100%" fo:font-size="16pt" style:text-underline-style="solid" style:text-underline-width="auto" style:text-underline-color="font-color" fo:font-weight="normal" officeooo:rsid="00070b66" officeooo:paragraph-rsid="00070b66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margin-left="1.251cm" fo:text-align="justify" style:justify-single-word="false" fo:text-indent="0cm" style:auto-text-indent="false"/>
      <style:text-properties fo:color="#000000" loext:opacity="100%" fo:font-size="16pt" style:text-underline-style="solid" style:text-underline-width="auto" style:text-underline-color="font-color" fo:font-weight="normal" officeooo:rsid="00070b66" officeooo:paragraph-rsid="000bcea6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margin-left="1.251cm" fo:text-align="justify" style:justify-single-word="false" fo:text-indent="0cm" style:auto-text-indent="false"/>
      <style:text-properties fo:color="#000000" loext:opacity="100%" fo:font-size="16pt" style:text-underline-style="solid" style:text-underline-width="auto" style:text-underline-color="font-color" fo:font-weight="normal" officeooo:rsid="00070b66" officeooo:paragraph-rsid="000d0cf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bold" officeooo:rsid="00070b66" officeooo:paragraph-rsid="00070b66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a933" loext:opacity="100%" fo:font-size="16pt" style:text-underline-style="none" fo:font-weight="bold" officeooo:rsid="00070b66" officeooo:paragraph-rsid="00070b66" style:font-size-asian="14pt" style:font-weight-asian="bold" style:font-size-complex="16pt" style:font-weight-complex="bold"/>
    </style:style>
    <style:style style:name="P20" style:family="paragraph" style:parent-style-name="Standard">
      <style:paragraph-properties fo:margin-left="0cm" fo:text-align="justify" style:justify-single-word="false" fo:text-indent="0cm" style:auto-text-indent="false"/>
      <style:text-properties fo:color="#00a933" loext:opacity="100%" fo:font-size="16pt" style:text-underline-style="none" fo:font-weight="bold" officeooo:rsid="00070b66" officeooo:paragraph-rsid="000bcea6" style:font-size-asian="14pt" style:font-weight-asian="bold" style:font-size-complex="16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6pt" fo:font-weight="normal" officeooo:rsid="00070b66" officeooo:paragraph-rsid="00070b66" style:font-size-asian="16pt" style:font-weight-asian="normal" style:font-size-complex="16pt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fo:font-size="16pt" fo:font-weight="normal" officeooo:rsid="00070b66" officeooo:paragraph-rsid="00070b66" style:font-size-asian="16pt" style:font-weight-asian="normal" style:font-size-complex="16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6pt" fo:font-weight="normal" officeooo:rsid="0003c390" officeooo:paragraph-rsid="0003c390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6pt" fo:font-weight="normal" officeooo:rsid="0003c390" officeooo:paragraph-rsid="0003c390" style:font-size-asian="16pt" style:font-weight-asian="normal" style:font-size-complex="16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6pt" fo:font-weight="normal" officeooo:rsid="0005b613" officeooo:paragraph-rsid="0005b613" style:font-size-asian="16pt" style:font-weight-asian="normal" style:font-size-complex="16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6pt" fo:font-weight="normal" officeooo:rsid="0005b613" officeooo:paragraph-rsid="00070b66" style:font-size-asian="16pt" style:font-weight-asian="normal" style:font-size-complex="16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6pt" fo:font-weight="normal" officeooo:rsid="000a6eae" officeooo:paragraph-rsid="000a6eae" style:font-size-asian="16pt" style:font-weight-asian="normal" style:font-size-complex="16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6pt" fo:font-weight="normal" officeooo:rsid="0008fb26" officeooo:paragraph-rsid="0008fb26" style:font-size-asian="16pt" style:font-weight-asian="normal" style:font-size-complex="16pt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font-size="16pt" fo:font-weight="normal" officeooo:rsid="0008fb26" officeooo:paragraph-rsid="0008fb26" style:font-size-asian="16pt" style:font-weight-asian="normal" style:font-size-complex="16pt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font-size="16pt" fo:font-weight="normal" officeooo:rsid="00081cf4" officeooo:paragraph-rsid="00081cf4" style:font-size-asian="16pt" style:font-weight-asian="normal" style:font-size-complex="16pt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officeooo:paragraph-rsid="00081cf4"/>
    </style:style>
    <style:style style:name="P32" style:family="paragraph" style:parent-style-name="Standard" style:list-style-name="L6">
      <style:paragraph-properties fo:text-align="justify" style:justify-single-word="false"/>
      <style:text-properties officeooo:paragraph-rsid="000d0cf0"/>
    </style:style>
    <style:style style:name="P33" style:family="paragraph" style:parent-style-name="Standard" style:list-style-name="L7">
      <style:paragraph-properties fo:text-align="justify" style:justify-single-word="false"/>
      <style:text-properties officeooo:paragraph-rsid="000d0cf0"/>
    </style:style>
    <style:style style:name="P34" style:family="paragraph" style:parent-style-name="Standard" style:list-style-name="L6">
      <style:paragraph-properties fo:text-align="justify" style:justify-single-word="false"/>
      <style:text-properties fo:color="#000000" loext:opacity="100%" fo:font-size="16pt" style:text-underline-style="none" fo:font-weight="normal" officeooo:rsid="00070b66" officeooo:paragraph-rsid="000d0cf0" style:font-size-asian="14pt" style:font-weight-asian="normal" style:font-size-complex="16pt" style:font-weight-complex="normal"/>
    </style:style>
    <style:style style:name="P35" style:family="paragraph" style:parent-style-name="Standard" style:list-style-name="L7">
      <style:paragraph-properties fo:text-align="justify" style:justify-single-word="false"/>
      <style:text-properties fo:color="#000000" loext:opacity="100%" fo:font-size="16pt" style:text-underline-style="none" fo:font-weight="normal" officeooo:rsid="00070b66" officeooo:paragraph-rsid="00070b66" style:font-size-asian="14pt" style:font-weight-asian="normal" style:font-size-complex="16pt" style:font-weight-complex="normal"/>
    </style:style>
    <style:style style:name="P36" style:family="paragraph" style:parent-style-name="Standard" style:list-style-name="L7">
      <style:paragraph-properties fo:text-align="justify" style:justify-single-word="false"/>
      <style:text-properties fo:color="#000000" loext:opacity="100%" fo:font-size="16pt" style:text-underline-style="none" fo:font-weight="normal" officeooo:rsid="00070b66" officeooo:paragraph-rsid="000d0cf0" style:font-size-asian="14pt" style:font-weight-asian="normal" style:font-size-complex="16pt" style:font-weight-complex="normal"/>
    </style:style>
    <style:style style:name="T1" style:family="text">
      <style:text-properties officeooo:rsid="00081cf4"/>
    </style:style>
    <style:style style:name="T2" style:family="text">
      <style:text-properties officeooo:rsid="000a6eae"/>
    </style:style>
    <style:style style:name="T3" style:family="text">
      <style:text-properties officeooo:rsid="000bcea6"/>
    </style:style>
    <style:style style:name="T4" style:family="text">
      <style:text-properties fo:font-size="16pt" fo:font-weight="normal" officeooo:rsid="00081cf4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08fb26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0bcea6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09950d" style:font-size-asian="16pt" style:font-weight-asian="normal" style:font-size-complex="16pt" style:font-weight-complex="normal"/>
    </style:style>
    <style:style style:name="T8" style:family="text">
      <style:text-properties fo:color="#000000" loext:opacity="100%" fo:font-size="16pt" style:text-underline-style="none" fo:font-weight="normal" officeooo:rsid="00070b66" style:font-size-asian="14pt" style:font-weight-asian="normal" style:font-size-complex="16pt" style:font-weight-complex="normal"/>
    </style:style>
    <style:style style:name="T9" style:family="text">
      <style:text-properties fo:color="#000000" loext:opacity="100%" fo:font-size="16pt" style:text-underline-style="none" fo:font-weight="normal" officeooo:rsid="000d0cf0" style:font-size-asian="14pt" style:font-weight-asian="normal" style:font-size-complex="16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d0cf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</text:p>
      <text:p text:style-name="P1"/>
      <text:p text:style-name="P7">Contraintes</text:p>
      <text:p text:style-name="P3">Contraintes aéronautiques</text:p>
      <text:list text:style-name="L1">
        <text:list-item>
          <text:p text:style-name="P21">Il doit s’agir d’un drone a aile fixe.</text:p>
        </text:list-item>
      </text:list>
      <text:list xml:id="list1197396331" text:style-name="L2">
        <text:list-item>
          <text:p text:style-name="P23">Vitesse de croisière sous les 8 m/s.</text:p>
        </text:list-item>
        <text:list-item>
          <text:p text:style-name="P25">Le drone doit voler en intérieur type gymnase .</text:p>
        </text:list-item>
        <text:list-item>
          <text:p text:style-name="P23">électronique <text:span text:style-name="T2">environ</text:span> 160 g d’électronique (moteur et batterie compris).</text:p>
        </text:list-item>
        <text:list-item>
          <text:p text:style-name="P23">Temps de vol entre 5 et 10 min.</text:p>
          <text:p text:style-name="P23"/>
        </text:list-item>
      </text:list>
      <text:p text:style-name="P3">Contraintes capteurs / calcul</text:p>
      <text:list text:style-name="L3">
        <text:list-item>
          <text:p text:style-name="P24"><text:span text:style-name="T2">U</text:span>n mpu 6050.</text:p>
        </text:list-item>
        <text:list-item>
          <text:p text:style-name="P24"><text:span text:style-name="T2">U</text:span>ne camera pi v3.</text:p>
        </text:list-item>
        <text:list-item>
          <text:p text:style-name="P24"><text:span text:style-name="T2">U</text:span>n Raspberry pi zero 2w.</text:p>
        </text:list-item>
        <text:list-item>
          <text:p text:style-name="P24"><text:span text:style-name="T2">U</text:span>n esp32.</text:p>
        </text:list-item>
      </text:list>
      <text:list text:continue-list="list1197396331" text:style-name="L2">
        <text:list-item>
          <text:p text:style-name="P25">La camera doit être orientée vers le sol et doit avoir tout son champs de vision disponible.</text:p>
        </text:list-item>
      </text:list>
      <text:p text:style-name="P5"/>
      <text:p text:style-name="P4">Contraintes fonctionnelles</text:p>
      <text:list text:continue-numbering="true" text:style-name="L2">
        <text:list-item>
          <text:p text:style-name="P27">Décollage et atterrissage autonome.</text:p>
        </text:list-item>
        <text:list-item>
          <text:p text:style-name="P27">Évitement des murs.</text:p>
        </text:list-item>
        <text:list-item>
          <text:p text:style-name="P27">Aucun pilote requis pendant le vol.</text:p>
        </text:list-item>
        <text:list-item>
          <text:p text:style-name="P28">L’autopilote doit pouvoir s’adapter à différents avions à partir de l’observation de leur comportement.</text:p>
          <text:p text:style-name="P26"/>
          <text:p text:style-name="P26"/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ypothèse <text:span text:style-name="T3">technique</text:span></text:p>
      <text:p text:style-name="P18"><text:span text:style-name="T3">H1- </text:span>Architecture aérodynamiqu<text:span text:style-name="T3">e</text:span></text:p>
      <text:list text:style-name="L4">
        <text:list-item>
          <text:p text:style-name="P22">Aile haute</text:p>
        </text:list-item>
        <text:list-item>
          <text:p text:style-name="P30">environ 1,20 a 1,40 m d’envergure pour minimiser la charge alaire</text:p>
        </text:list-item>
      </text:list>
      <text:p text:style-name="P9"/>
      <text:p text:style-name="P18">H2- Répartition électronique</text:p>
      <text:list text:style-name="L5">
        <text:list-item>
          <text:p text:style-name="P31"><text:span text:style-name="T6">H</text:span><text:span text:style-name="T4">élice </text:span><text:span text:style-name="T5">et moteur</text:span><text:span text:style-name="T4"> </text:span><text:span text:style-name="T5">à</text:span><text:span text:style-name="T4"> l’avant pour simplicité et le centrage</text:span></text:p>
        </text:list-item>
        <text:list-item>
          <text:p text:style-name="P29"><text:span text:style-name="T1">mpu </text:span><text:span text:style-name="T3">6050</text:span><text:span text:style-name="T1"> proche du Cg</text:span></text:p>
        </text:list-item>
        <text:list-item>
          <text:p text:style-name="P29"><text:span text:style-name="T1"><text:s/>pi </text:span><text:span text:style-name="T3">0 2w</text:span><text:span text:style-name="T1"> et esp </text:span><text:span text:style-name="T3">32</text:span><text:span text:style-name="T1"> en uart </text:span><text:span text:style-name="T3">et </text:span><text:span text:style-name="T1">proche</text:span></text:p>
        </text:list-item>
      </text:list>
      <text:p text:style-name="P9"/>
      <text:p text:style-name="P18">H3- Architecture logicielle</text:p>
      <text:p text:style-name="P19">ESP32</text:p>
      <text:p text:style-name="P15">Responsabilités :</text:p>
      <text:p text:style-name="P12"><text:span text:style-name="T3">A</text:span>cquisition IMU </text:p>
      <text:p text:style-name="P12"><text:span text:style-name="T3">E</text:span>stimation attitude </text:p>
      <text:p text:style-name="P12"><text:span text:style-name="T3">S</text:span>tabilisation </text:p>
      <text:p text:style-name="P12"><text:span text:style-name="T3">C</text:span>ommande moteur/servos.</text:p>
      <text:p text:style-name="P11"/>
      <text:p text:style-name="P15">Fréquence :</text:p>
      <text:p text:style-name="P12"><text:span text:style-name="T3">B</text:span>oucle de contrôle : 100 Hz</text:p>
      <text:p text:style-name="P11"/>
      <text:p text:style-name="P15">Entrées :</text:p>
      <text:p text:style-name="P12">mesures IMU </text:p>
      <text:p text:style-name="P12">consignes Pi.</text:p>
      <text:p text:style-name="P11"/>
      <text:p text:style-name="P15">Sorties :</text:p>
      <text:p text:style-name="P12">gouvernes </text:p>
      <text:p text:style-name="P13">Moteur </text:p>
      <text:p text:style-name="P20">Raspberry Pi</text:p>
      <text:p text:style-name="P15">Responsabilités :</text:p>
      <text:p text:style-name="P12">vision </text:p>
      <text:p text:style-name="P12">localisation </text:p>
      <text:p text:style-name="P12">planification trajectoire </text:p>
      <text:p text:style-name="P12">fusion capteurs.</text:p>
      <text:p text:style-name="P12"/>
      <text:p text:style-name="P16">Entrées :</text:p>
      <text:p text:style-name="P13">Position</text:p>
      <text:p text:style-name="P13"><text:span text:style-name="T11">O</text:span>rientation (Mpu + aruco)</text:p>
      <text:p text:style-name="P14">Dimension de l’espace aerien</text:p>
      <text:p text:style-name="P17"><text:soft-page-break/>Sorties :</text:p>
      <text:p text:style-name="P14">Ordre pour l’esp32</text:p>
      <text:p text:style-name="P17"/>
      <text:p text:style-name="P15">Fréquence :</text:p>
      <text:p text:style-name="P12">boucle décision : 10–20 Hz</text:p>
      <text:p text:style-name="P12"/>
      <text:p text:style-name="P9"><text:span text:style-name="T10">H4- Localisation</text:span> </text:p>
      <text:list text:style-name="L6">
        <text:list-item>
          <text:p text:style-name="P32"><text:span text:style-name="T9">U</text:span><text:span text:style-name="T8">tilisation de marqueurs ArUco 4×4 (dict_50) placés dans le gymnase.</text:span></text:p>
        </text:list-item>
        <text:list-item>
          <text:p text:style-name="P32"><text:span text:style-name="T9">P</text:span><text:span text:style-name="T8">ositions des marqueurs connues </text:span></text:p>
        </text:list-item>
        <text:list-item>
          <text:p text:style-name="P34">calibration caméra préalable.</text:p>
        </text:list-item>
      </text:list>
      <text:p text:style-name="P10"/>
      <text:p text:style-name="P10">Sorties :</text:p>
      <text:list text:style-name="L7">
        <text:list-item>
          <text:p text:style-name="P35">position (x,y,z) ;</text:p>
        </text:list-item>
        <text:list-item>
          <text:p text:style-name="P33"><text:span text:style-name="T8">orientation </text:span><text:span text:style-name="T9">(roll, yaw, pitch)</text:span><text:span text:style-name="T8">.</text:span></text:p>
        </text:list-item>
        <text:list-item>
          <text:p text:style-name="P36">recalage périodique pour corriger dérive gyroscope.</text:p>
        </text:list-item>
      </text:list>
      <text:p text:style-name="P18">H5- Navigation</text:p>
      <text:p text:style-name="P6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9:42:08.007915775</meta:creation-date>
    <dc:date>2026-06-17T01:24:15.381346857</dc:date>
    <meta:editing-duration>PT5M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68" meta:word-count="286" meta:character-count="1686" meta:non-whitespace-character-count="1482"/>
  </office:meta>
</office:document-meta>
</file>