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id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.225" calcext:value-type="float">
            <text:p>1,225</text:p>
          </table:table-cell>
          <table:table-cell office:value-type="float" office:value="0.11" calcext:value-type="float">
            <text:p>0,11</text:p>
          </table:table-cell>
          <table:table-cell/>
          <table:table-cell table:formula="of:=SQRT(([.A2]*9.81*2)/([.B2]*[.C2]*[.D2]))" office:value-type="float" office:value="6.60915202866702" calcext:value-type="float">
            <text:p>6,60915202866702</text:p>
          </table:table-cell>
        </table:table-row>
        <table:table-row table:style-name="ro1">
          <table:table-cell table:number-columns-repeated="5"/>
          <table:table-cell table:formula="of:=[.F2]*3.6" office:value-type="float" office:value="23.7929473032013" calcext:value-type="float">
            <text:p>23,792947303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/00/0000</text:date>, <text:time style:data-style-name="N2" text:time-value="19:11:43.201745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3T19:11:46.167289556</meta:creation-date>
    <meta:editing-duration>PT45S</meta:editing-duration>
    <meta:editing-cycles>2</meta:editing-cycles>
    <meta:generator>LibreOffice/24.2.7.2$Linux_X86_64 LibreOffice_project/420$Build-2</meta:generator>
    <dc:date>2026-07-23T19:12:28.076633642</dc:date>
    <meta:document-statistic meta:table-count="1" meta:cell-count="11" meta:object-count="0"/>
  </office:meta>
</office:document-meta>
</file>